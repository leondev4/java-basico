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2">
      <style:paragraph-properties fo:text-align="justify" style:justify-single-word="false"/>
    </style:style>
    <style:style style:name="P2" style:family="paragraph" style:parent-style-name="Text_20_body">
      <style:paragraph-properties fo:text-align="left" style:justify-single-word="false"/>
    </style:style>
    <style:style style:name="P3" style:family="paragraph" style:parent-style-name="Horizontal_20_Line">
      <style:paragraph-properties fo:margin-top="0cm" fo:margin-bottom="0.247cm" style:contextual-spacing="false" fo:line-height="115%" fo:text-align="justify" style:justify-single-word="false"/>
    </style:style>
    <style:style style:name="P4" style:family="paragraph" style:parent-style-name="Heading_20_3">
      <style:paragraph-properties fo:margin-top="0cm" fo:margin-bottom="0.247cm" style:contextual-spacing="false" fo:line-height="115%" fo:text-align="justify" style:justify-single-word="false"/>
    </style:style>
    <style:style style:name="P5" style:family="paragraph" style:parent-style-name="Text_20_body" style:list-style-name="L1">
      <style:paragraph-properties fo:text-align="justify" style:justify-single-word="false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 style:list-style-name="L2">
      <style:paragraph-properties fo:text-align="justify" style:justify-single-word="false"/>
    </style:style>
    <style:style style:name="P8" style:family="paragraph" style:parent-style-name="Text_20_body" style:list-style-name="L3">
      <style:paragraph-properties fo:text-align="justify" style:justify-single-word="false"/>
    </style:style>
    <style:style style:name="P9" style:family="paragraph" style:parent-style-name="Text_20_body" style:list-style-name="L4">
      <style:paragraph-properties fo:text-align="justify" style:justify-single-word="false"/>
    </style:style>
    <style:style style:name="P10" style:family="paragraph" style:parent-style-name="Text_20_body" style:list-style-name="L5">
      <style:paragraph-properties fo:text-align="justify" style:justify-single-word="false"/>
    </style:style>
    <style:style style:name="P11" style:family="paragraph" style:parent-style-name="Text_20_body" style:list-style-name="L6">
      <style:paragraph-properties fo:text-align="justify" style:justify-single-word="false"/>
    </style:style>
    <style:style style:name="P12" style:family="paragraph" style:parent-style-name="Text_20_body" style:list-style-name="L7">
      <style:paragraph-properties fo:text-align="justify" style:justify-single-word="false"/>
    </style:style>
    <style:style style:name="P13" style:family="paragraph" style:parent-style-name="Text_20_body" style:list-style-name="L8">
      <style:paragraph-properties fo:text-align="justify" style:justify-single-word="false"/>
    </style:style>
    <style:style style:name="T1" style:family="text">
      <style:text-properties officeooo:rsid="0016123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TEMARIO DEL CURSO – JAVA <text:span text:style-name="T1">BASICO </text:span>DESDE CERO</text:h>
      <text:p text:style-name="P2"><text:span text:style-name="Strong_20_Emphasis">Distribución: </text:span>15 horas presenciales + 15 horas no presenciales<text:line-break/><text:span text:style-name="Strong_20_Emphasis">Proyecto integrador:</text:span> Mini sistema de gestión de estudiantes</text:p>
      <text:p text:style-name="P3"/>
      <text:h text:style-name="P4" text:outline-level="3">MÓDULO 1 – Fundamentos de programación y entorno Java</text:h>
      <text:list text:style-name="L1">
        <text:list-item>
          <text:p text:style-name="P5">Algoritmos y pseudocódigo</text:p>
        </text:list-item>
        <text:list-item>
          <text:p text:style-name="P5">Instalación de JDK e IDE</text:p>
        </text:list-item>
        <text:list-item>
          <text:p text:style-name="P5">Estructura de un programa Java</text:p>
        </text:list-item>
        <text:list-item>
          <text:p text:style-name="P5">Método <text:span text:style-name="Source_20_Text">main</text:span></text:p>
        </text:list-item>
        <text:list-item>
          <text:p text:style-name="P5">Salida por consola (<text:span text:style-name="Source_20_Text">System.out.println</text:span>)</text:p>
        </text:list-item>
        <text:list-item>
          <text:p text:style-name="P5">Variables y tipos primitivos</text:p>
        </text:list-item>
      </text:list>
      <text:p text:style-name="P6"><text:span text:style-name="Strong_20_Emphasis">Horas:</text:span> 1.5 presenciales + 1.5 no presenciales</text:p>
      <text:p text:style-name="P3"/>
      <text:h text:style-name="P4" text:outline-level="3">MÓDULO 2 – Entrada de datos y operadores</text:h>
      <text:list text:style-name="L2">
        <text:list-item>
          <text:p text:style-name="P7">Clase <text:span text:style-name="Source_20_Text">Scanner</text:span> para entrada por teclado</text:p>
        </text:list-item>
        <text:list-item>
          <text:p text:style-name="P7">Operadores aritméticos</text:p>
        </text:list-item>
        <text:list-item>
          <text:p text:style-name="P7">Operadores relacionales</text:p>
        </text:list-item>
        <text:list-item>
          <text:p text:style-name="P7">Operadores lógicos</text:p>
        </text:list-item>
        <text:list-item>
          <text:p text:style-name="P7">Precedencia de operadores</text:p>
        </text:list-item>
      </text:list>
      <text:p text:style-name="P6"><text:span text:style-name="Strong_20_Emphasis">Horas:</text:span> 1.5 presenciales + 1.5 no presenciales</text:p>
      <text:p text:style-name="P3"/>
      <text:h text:style-name="P4" text:outline-level="3">MÓDULO 3 – Estructuras condicionales</text:h>
      <text:list text:style-name="L3">
        <text:list-item>
          <text:p text:style-name="P8"><text:span text:style-name="Source_20_Text">if</text:span>, <text:span text:style-name="Source_20_Text">else if</text:span>, <text:span text:style-name="Source_20_Text">else</text:span></text:p>
        </text:list-item>
        <text:list-item>
          <text:p text:style-name="P8"><text:span text:style-name="Source_20_Text">switch</text:span></text:p>
        </text:list-item>
        <text:list-item>
          <text:p text:style-name="P8">Operador ternario</text:p>
        </text:list-item>
      </text:list>
      <text:p text:style-name="P6"><text:span text:style-name="Strong_20_Emphasis">Horas:</text:span> 1.5 presenciales + 1.5 no presenciales</text:p>
      <text:p text:style-name="P3"/>
      <text:h text:style-name="P4" text:outline-level="3">MÓDULO 4 – Bucles</text:h>
      <text:list text:style-name="L4">
        <text:list-item>
          <text:p text:style-name="P9">Bucle <text:span text:style-name="Source_20_Text">for</text:span></text:p>
        </text:list-item>
        <text:list-item>
          <text:p text:style-name="P9">Bucle <text:span text:style-name="Source_20_Text">while</text:span></text:p>
        </text:list-item>
        <text:list-item>
          <text:p text:style-name="P9"><text:soft-page-break/>Bucle <text:span text:style-name="Source_20_Text">do-while</text:span></text:p>
        </text:list-item>
        <text:list-item>
          <text:p text:style-name="P9">Sentencias <text:span text:style-name="Source_20_Text">break</text:span> y <text:span text:style-name="Source_20_Text">continue</text:span></text:p>
        </text:list-item>
      </text:list>
      <text:p text:style-name="P6"><text:span text:style-name="Strong_20_Emphasis">Horas:</text:span> 2.0 presenciales + 2.0 no presenciales</text:p>
      <text:p text:style-name="P3"/>
      <text:h text:style-name="P4" text:outline-level="3">MÓDULO 5 – Arrays y cadenas</text:h>
      <text:list text:style-name="L5">
        <text:list-item>
          <text:p text:style-name="P10">Declaración e inicialización de arrays</text:p>
        </text:list-item>
        <text:list-item>
          <text:p text:style-name="P10">Recorrido de arrays (incluyendo <text:span text:style-name="Source_20_Text">for</text:span> mejorado)</text:p>
        </text:list-item>
        <text:list-item>
          <text:p text:style-name="P10">Métodos básicos de la clase <text:span text:style-name="Source_20_Text">String</text:span> (<text:span text:style-name="Source_20_Text">length</text:span>, <text:span text:style-name="Source_20_Text">charAt</text:span>, <text:span text:style-name="Source_20_Text">substring</text:span>, <text:span text:style-name="Source_20_Text">equals</text:span>)</text:p>
        </text:list-item>
      </text:list>
      <text:p text:style-name="P6"><text:span text:style-name="Strong_20_Emphasis">Horas:</text:span> 2.0 presenciales + 2.0 no presenciales</text:p>
      <text:p text:style-name="P3"/>
      <text:h text:style-name="P4" text:outline-level="3">MÓDULO 6 – Métodos (funciones)</text:h>
      <text:list text:style-name="L6">
        <text:list-item>
          <text:p text:style-name="P11">Definición de métodos</text:p>
        </text:list-item>
        <text:list-item>
          <text:p text:style-name="P11">Parámetros y retorno de valores</text:p>
        </text:list-item>
        <text:list-item>
          <text:p text:style-name="P11">Ámbito de variables</text:p>
        </text:list-item>
        <text:list-item>
          <text:p text:style-name="P11">Introducción a la sobrecarga de métodos</text:p>
        </text:list-item>
      </text:list>
      <text:p text:style-name="P6"><text:span text:style-name="Strong_20_Emphasis">Horas:</text:span> 1.5 presenciales + 1.5 no presenciales</text:p>
      <text:p text:style-name="P3"/>
      <text:h text:style-name="P4" text:outline-level="3">MÓDULO 7 – Introducción a la programación orientada a objetos</text:h>
      <text:list text:style-name="L7">
        <text:list-item>
          <text:p text:style-name="P12">Clases y objetos</text:p>
        </text:list-item>
        <text:list-item>
          <text:p text:style-name="P12">Atributos y métodos de instancia</text:p>
        </text:list-item>
        <text:list-item>
          <text:p text:style-name="P12">Constructores</text:p>
        </text:list-item>
        <text:list-item>
          <text:p text:style-name="P12">Encapsulamiento (<text:span text:style-name="Source_20_Text">private</text:span>, getters y setters)</text:p>
        </text:list-item>
      </text:list>
      <text:p text:style-name="P6"><text:span text:style-name="Strong_20_Emphasis">Horas:</text:span> 2.5 presenciales + 2.5 no presenciales</text:p>
      <text:p text:style-name="P3"/>
      <text:h text:style-name="P4" text:outline-level="3">MÓDULO 8 – Proyecto integrador</text:h>
      <text:list text:style-name="L8">
        <text:list-item>
          <text:p text:style-name="P13">Mini sistema de gestión de estudiantes</text:p>
        </text:list-item>
        <text:list-item>
          <text:p text:style-name="P13">Clase <text:span text:style-name="Source_20_Text">Estudiante</text:span></text:p>
        </text:list-item>
        <text:list-item>
          <text:p text:style-name="P13">Funcionalidades: agregar, listar, buscar, calcular promedio</text:p>
        </text:list-item>
        <text:list-item>
          <text:p text:style-name="P13">Implementación de menú y lógica completa</text:p>
        </text:list-item>
      </text:list>
      <text:p text:style-name="P6"><text:span text:style-name="Strong_20_Emphasis">Horas:</text:span> 2.5 presenciales + 2.5 no presencial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3T11:17:21.971096000</meta:creation-date>
    <dc:date>2026-06-13T11:35:22.406045000</dc:date>
    <meta:editing-duration>PT18M</meta:editing-duration>
    <meta:editing-cycles>1</meta:editing-cycles>
    <meta:document-statistic meta:table-count="0" meta:image-count="0" meta:object-count="0" meta:page-count="2" meta:paragraph-count="51" meta:word-count="284" meta:character-count="1756" meta:non-whitespace-character-count="1547"/>
    <meta:generator>LibreOffice/26.2.3.2$MacOSX_AARCH64 LibreOffice_project/70e089b17412e4cb7773e41413306b17a2328c34</meta:generator>
  </office:meta>
</office:document-meta>
</file>